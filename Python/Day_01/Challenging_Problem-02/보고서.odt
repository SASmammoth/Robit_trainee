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OpenSymbol" svg:font-family="OpenSymbol" style:font-charset="x-symbol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1" style:family="table-row">
      <style:table-row-properties style:min-row-height="15.002cm"/>
    </style:style>
    <style:style style:name="표1.A1" style:family="table-cell">
      <style:table-cell-properties fo:padding="0.097cm" fo:border="0.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1" style:family="table-row">
      <style:table-row-properties fo:keep-together="always"/>
    </style:style>
    <style:style style:name="표2.A1" style:family="table-cell">
      <style:table-cell-properties fo:padding="0.097cm" fo:border="0.5pt solid #000000"/>
    </style:style>
    <style:style style:name="P1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end" style:justify-single-word="false"/>
      <style:text-properties officeooo:rsid="00045eec" officeooo:paragraph-rsid="00045eec"/>
    </style:style>
    <style:style style:name="P3" style:family="paragraph" style:parent-style-name="Text_20_body">
      <style:text-properties officeooo:paragraph-rsid="0000edd0"/>
    </style:style>
    <style:style style:name="P4" style:family="paragraph" style:parent-style-name="Standard">
      <style:text-properties officeooo:rsid="0000edd0" officeooo:paragraph-rsid="0000edd0"/>
    </style:style>
    <style:style style:name="P5" style:family="paragraph" style:parent-style-name="Text_20_body">
      <style:text-properties officeooo:rsid="0000edd0" officeooo:paragraph-rsid="0000edd0"/>
    </style:style>
    <style:style style:name="P6" style:family="paragraph" style:parent-style-name="Text_20_body">
      <style:text-properties officeooo:rsid="0001c680" officeooo:paragraph-rsid="0001c680"/>
    </style:style>
    <style:style style:name="P7" style:family="paragraph" style:parent-style-name="Heading_20_3">
      <style:text-properties officeooo:paragraph-rsid="0001c680"/>
    </style:style>
    <style:style style:name="P8" style:family="paragraph" style:parent-style-name="Text_20_body">
      <style:text-properties officeooo:paragraph-rsid="0001c680"/>
    </style:style>
    <style:style style:name="P9" style:family="paragraph" style:parent-style-name="Text_20_body">
      <style:text-properties officeooo:rsid="00032866" officeooo:paragraph-rsid="0003f7f1"/>
    </style:style>
    <style:style style:name="P10" style:family="paragraph" style:parent-style-name="Text_20_body">
      <style:text-properties officeooo:rsid="0003f7f1" officeooo:paragraph-rsid="0003f7f1"/>
    </style:style>
    <style:style style:name="T1" style:family="text">
      <style:text-properties officeooo:rsid="0000edd0"/>
    </style:style>
    <style:style style:name="T2" style:family="text">
      <style:text-properties officeooo:rsid="0001c680"/>
    </style:style>
    <style:style style:name="T3" style:family="text">
      <style:text-properties officeooo:rsid="0003f7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고급 과제-2</text:h>
      <text:p text:style-name="P2">2024402035_장경민</text:p>
      <text:h text:style-name="Heading_20_3" text:outline-level="3">1. LLM 입력 프롬프트 (전문은 prompt.txt에 저장되어 있음)</text:h>
      <text:p text:style-name="P3">사용된 <text:span text:style-name="T1">LLM : Claude Fable5 작업량:높음</text:span></text:p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Table_20_Contents">명령어 기반 도서 대출 관리 시스템을 Python을 이용해서 만들거야, 도서대출관리시스템 클래스를 만들어 줘.</text:p>
            <text:p text:style-name="Table_20_Contents">각각의 매서드는 add_book(book_name, num), borrow_book(user_name, book_name), return_book(user_name, book_name), status_book(book_name), user(user_name), list, Exit 이다.</text:p>
            <text:p text:style-name="Table_20_Contents">add_book :</text:p>
            <text:p text:style-name="Table_20_Contents">- 책 등록, 이미 있으면 수량 추가</text:p>
            <text:p text:style-name="Table_20_Contents"/>
            <text:p text:style-name="Table_20_Contents">borrow_book :</text:p>
            <text:p text:style-name="Table_20_Contents">- 책이 있고 수량이 남아 있으며, 같은 사용자가 같은 책을 대출 중이 아닐 때만 대출</text:p>
            <text:p text:style-name="Table_20_Contents">- 실패 시 ERROR + 사유 출력</text:p>
            <text:p text:style-name="Table_20_Contents"/>
            <text:p text:style-name="Table_20_Contents">return_book :</text:p>
            <text:p text:style-name="Table_20_Contents">- 실제로 대출 중인 책만 반납 가능</text:p>
            <text:p text:style-name="Table_20_Contents">- 실패 시 ERROR + 사유 출력</text:p>
            <text:p text:style-name="Table_20_Contents"/>
            <text:p text:style-name="Table_20_Contents">status_book :</text:p>
            <text:p text:style-name="Table_20_Contents">- 남은 수량 출력</text:p>
            <text:p text:style-name="Table_20_Contents">- 책이 존재하지 않으면 ERROR 출력</text:p>
            <text:p text:style-name="Table_20_Contents"/>
            <text:p text:style-name="Table_20_Contents">user :</text:p>
            <text:p text:style-name="Table_20_Contents">- user_name의 대출 목록 출력</text:p>
            <text:p text:style-name="Table_20_Contents">- 없으면 EMPTY</text:p>
            <text:p text:style-name="Table_20_Contents"/>
            <text:p text:style-name="Table_20_Contents">list :</text:p>
            <text:p text:style-name="Table_20_Contents">- 전체 책 목록을 등록 순서대로 출력</text:p>
            <text:p text:style-name="Table_20_Contents"/>
            <text:p text:style-name="Table_20_Contents">Exit</text:p>
            <text:p text:style-name="Table_20_Contents">- 종료</text:p>
            <text:p text:style-name="Table_20_Contents"/>
            <text:p text:style-name="Table_20_Contents">책과 사용자 이름에는 공백이 없어야 함</text:p>
          </table:table-cell>
        </table:table-row>
      </table:table>
      <text:p text:style-name="P4"/>
      <text:h text:style-name="Heading_20_3" text:outline-level="3">2. 프롬프트 입력 후 LLM 첫 출력 코드 (.py 형태)</text:h>
      <text:p text:style-name="P5">library_system.py </text:p>
      <text:p text:style-name="P5"/>
      <text:h text:style-name="Heading_20_3" text:outline-level="3"><text:soft-page-break/>3. 오류 및 개선점 분석</text:h>
      <table:table table:name="표2" table:style-name="표2">
        <table:table-column table:style-name="표2.A"/>
        <table:table-row table:style-name="표2.1">
          <table:table-cell table:style-name="표2.A1" office:value-type="string">
            <text:p text:style-name="P5">오류 :</text:p>
            <text:p text:style-name="P5">test_case.txt와 같이 몇 가지 테스트를 진행해 보았으나 큰 오류를 발견하지 못함.</text:p>
            <text:p text:style-name="P5"/>
            <text:p text:style-name="P5">개선점 :</text:p>
            <text:p text:style-name="P5">a. 함수의 이름을 “status_book”등으로 하려고 위와같이 프롬프트를 입력하였는데, 사용자의 입력 명령어가 “status_book”등으로 코딩됨. 이를 문제와 같은형식인 “status”로 수정함</text:p>
            <text:p text:style-name="P6">b. 다른 명령어는 상세한 출력이 나오는데, “user” 만 대답이 좀 짧은거 같아서 수정함</text:p>
          </table:table-cell>
        </table:table-row>
      </table:table>
      <text:p text:style-name="P5"/>
      <text:h text:style-name="P7" text:outline-level="3" text:is-list-header="true"><text:span text:style-name="T2">4</text:span>. 개선한 코드 (.py)</text:h>
      <text:p text:style-name="P8">library_system_modifiy.py</text:p>
      <text:p text:style-name="P8"/>
      <text:h text:style-name="P7" text:outline-level="3" text:is-list-header="true">5. LLM 프롬프트 입력 단계부터 오류 개선까지의 고찰</text:h>
      <text:p text:style-name="P9">LLM 프롬프트만 잘 넣으면 고급-과제<text:span text:style-name="T3">2 같은 간단한 문제는 사람과는 비교할 수 없는 속도로 코드를 작성한다.</text:span></text:p>
      <text:p text:style-name="P10">개선점 a 같이 사용자가 프롬프트 입력을 애매하게 하면 출력도 애매하게 나오는 등 약간의 디테일에 관한 문제가 있는 거 같다. 그러나 이 또한 LLM 프롬프트로 입력하여 쉽고 편하게 해결할 수 있는 문제라서, 확실히 사람보다 간단한 코드를 빠르고 잘 만들어 준다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3T20:02:02.720907498</meta:creation-date>
    <dc:date>2026-07-13T20:38:37.398083969</dc:date>
    <meta:editing-duration>PT11M1S</meta:editing-duration>
    <meta:editing-cycles>3</meta:editing-cycles>
    <meta:generator>LibreOffice/25.8.7.3$Linux_X86_64 LibreOffice_project/580$Build-3</meta:generator>
    <meta:document-statistic meta:table-count="2" meta:image-count="0" meta:object-count="0" meta:page-count="2" meta:paragraph-count="38" meta:word-count="261" meta:character-count="1182" meta:non-whitespace-character-count="958"/>
  </office:meta>
</office:document-meta>
</file>